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F000000DC14CB025F.png" manifest:media-type="image/png"/>
  <manifest:file-entry manifest:full-path="Pictures/10000001000001A000000117BEFAAE3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arial black" svg:font-family="'arial black'"/>
  </office:font-face-decls>
  <office:automatic-styles>
    <style:style style:name="Table1" style:family="table">
      <style:table-properties style:width="2.0583in" table:align="left"/>
    </style:style>
    <style:style style:name="Table1.A" style:family="table-column">
      <style:table-column-properties style:column-width="1.0264in"/>
    </style:style>
    <style:style style:name="Table1.B" style:family="table-column">
      <style:table-column-properties style:column-width="1.0319in"/>
    </style:style>
    <style:style style:name="Table1.A1" style:family="table-cell">
      <style:table-cell-properties style:vertical-align="middle" fo:padding="0.0194in" fo:border="none"/>
    </style:style>
    <style:style style:name="Table2" style:family="table">
      <style:table-properties style:width="5.0681in" table:align="left"/>
    </style:style>
    <style:style style:name="Table2.A" style:family="table-column">
      <style:table-column-properties style:column-width="1.0236in"/>
    </style:style>
    <style:style style:name="Table2.B" style:family="table-column">
      <style:table-column-properties style:column-width="0.9299in"/>
    </style:style>
    <style:style style:name="Table2.C" style:family="table-column">
      <style:table-column-properties style:column-width="0.9944in"/>
    </style:style>
    <style:style style:name="Table2.D" style:family="table-column">
      <style:table-column-properties style:column-width="0.8556in"/>
    </style:style>
    <style:style style:name="Table2.E" style:family="table-column">
      <style:table-column-properties style:column-width="1.2646in"/>
    </style:style>
    <style:style style:name="Table2.A1" style:family="table-cell">
      <style:table-cell-properties style:vertical-align="middle" fo:padding="0.0194in" fo:border="none"/>
    </style:style>
    <style:style style:name="Table3" style:family="table">
      <style:table-properties style:width="3.3042in" table:align="left"/>
    </style:style>
    <style:style style:name="Table3.A" style:family="table-column">
      <style:table-column-properties style:column-width="0.8167in"/>
    </style:style>
    <style:style style:name="Table3.B" style:family="table-column">
      <style:table-column-properties style:column-width="2.4875in"/>
    </style:style>
    <style:style style:name="Table3.A1" style:family="table-cell">
      <style:table-cell-properties style:vertical-align="middle" fo:background-color="#191970" fo:padding="0.0194in" fo:border="none">
        <style:background-image/>
      </style:table-cell-properties>
    </style:style>
    <style:style style:name="Table3.A3" style:family="table-cell">
      <style:table-cell-properties style:vertical-align="middle" fo:background-color="#dedee2" fo:padding="0.0194in" fo:border="none">
        <style:background-image/>
      </style:table-cell-properties>
    </style:style>
    <style:style style:name="Table3.A4" style:family="table-cell">
      <style:table-cell-properties style:vertical-align="middle" fo:padding="0.0194in" fo:border="none"/>
    </style:style>
    <style:style style:name="Table3.B4" style:family="table-cell">
      <style:table-cell-properties style:vertical-align="middle" fo:padding="0.0194in" fo:border="none"/>
    </style:style>
    <style:style style:name="Table3.A5" style:family="table-cell">
      <style:table-cell-properties style:vertical-align="middle" fo:padding="0.0194in" fo:border="none"/>
    </style:style>
    <style:style style:name="Table3.B5" style:family="table-cell">
      <style:table-cell-properties style:vertical-align="middle" fo:padding="0.0194in" fo:border="none"/>
    </style:style>
    <style:style style:name="Table3.A6" style:family="table-cell">
      <style:table-cell-properties style:vertical-align="middle" fo:padding="0.0194in" fo:border="none"/>
    </style:style>
    <style:style style:name="Table3.B6" style:family="table-cell">
      <style:table-cell-properties style:vertical-align="middle" fo:padding="0.0194in" fo:border="none"/>
    </style:style>
    <style:style style:name="Table3.A8" style:family="table-cell">
      <style:table-cell-properties style:vertical-align="middle" fo:padding="0.0194in" fo:border="none"/>
    </style:style>
    <style:style style:name="Table3.B8" style:family="table-cell">
      <style:table-cell-properties style:vertical-align="middle" fo:padding="0.0194in" fo:border="none"/>
    </style:style>
    <style:style style:name="Table3.A9" style:family="table-cell">
      <style:table-cell-properties style:vertical-align="middle" fo:padding="0.0194in" fo:border="none"/>
    </style:style>
    <style:style style:name="Table3.B9" style:family="table-cell">
      <style:table-cell-properties style:vertical-align="middle" fo:padding="0.0194in" fo:border="none"/>
    </style:style>
    <style:style style:name="Table3.A10" style:family="table-cell">
      <style:table-cell-properties style:vertical-align="middle" fo:padding="0.0194in" fo:border="none"/>
    </style:style>
    <style:style style:name="Table3.B10" style:family="table-cell">
      <style:table-cell-properties style:vertical-align="middle" fo:padding="0.0194in" fo:border="none"/>
    </style:style>
    <style:style style:name="Table3.A12" style:family="table-cell">
      <style:table-cell-properties style:vertical-align="middle" fo:padding="0.0194in" fo:border="none"/>
    </style:style>
    <style:style style:name="Table3.B12" style:family="table-cell">
      <style:table-cell-properties style:vertical-align="middle" fo:padding="0.0194in" fo:border="none"/>
    </style:style>
    <style:style style:name="Table4" style:family="table">
      <style:table-properties style:width="2.4979in" table:align="left"/>
    </style:style>
    <style:style style:name="Table4.A" style:family="table-column">
      <style:table-column-properties style:column-width="0.8167in"/>
    </style:style>
    <style:style style:name="Table4.B" style:family="table-column">
      <style:table-column-properties style:column-width="1.6813in"/>
    </style:style>
    <style:style style:name="Table4.A1" style:family="table-cell">
      <style:table-cell-properties style:vertical-align="middle" fo:background-color="#191970" fo:padding="0.0194in" fo:border="none">
        <style:background-image/>
      </style:table-cell-properties>
    </style:style>
    <style:style style:name="Table4.A2" style:family="table-cell">
      <style:table-cell-properties style:vertical-align="middle" fo:background-color="#dedee2" fo:padding="0.0194in" fo:border="none">
        <style:background-image/>
      </style:table-cell-properties>
    </style:style>
    <style:style style:name="Table4.A3" style:family="table-cell">
      <style:table-cell-properties style:vertical-align="middle" fo:padding="0.0194in" fo:border="none"/>
    </style:style>
    <style:style style:name="Table4.B3" style:family="table-cell">
      <style:table-cell-properties style:vertical-align="middle" fo:padding="0.0194in" fo:border="none"/>
    </style:style>
    <style:style style:name="Table4.A4" style:family="table-cell">
      <style:table-cell-properties style:vertical-align="middle" fo:padding="0.0194in" fo:border="none"/>
    </style:style>
    <style:style style:name="Table4.B4" style:family="table-cell">
      <style:table-cell-properties style:vertical-align="middle" fo:padding="0.0194in" fo:border="none"/>
    </style:style>
    <style:style style:name="Table4.A5" style:family="table-cell">
      <style:table-cell-properties style:vertical-align="middle" fo:padding="0.0194in" fo:border="none"/>
    </style:style>
    <style:style style:name="Table4.B5" style:family="table-cell">
      <style:table-cell-properties style:vertical-align="middle" fo:padding="0.0194in" fo:border="none"/>
    </style:style>
    <style:style style:name="Table4.A7" style:family="table-cell">
      <style:table-cell-properties style:vertical-align="middle" fo:padding="0.0194in" fo:border="none"/>
    </style:style>
    <style:style style:name="Table4.B7" style:family="table-cell">
      <style:table-cell-properties style:vertical-align="middle" fo:padding="0.0194in" fo:border="none"/>
    </style:style>
    <style:style style:name="Table4.A8" style:family="table-cell">
      <style:table-cell-properties style:vertical-align="middle" fo:padding="0.0194in" fo:border="none"/>
    </style:style>
    <style:style style:name="Table4.B8" style:family="table-cell">
      <style:table-cell-properties style:vertical-align="middle" fo:padding="0.0194in" fo:border="none"/>
    </style:style>
    <style:style style:name="Table4.A9" style:family="table-cell">
      <style:table-cell-properties style:vertical-align="middle" fo:padding="0.0194in" fo:border="none"/>
    </style:style>
    <style:style style:name="Table4.B9" style:family="table-cell">
      <style:table-cell-properties style:vertical-align="middle" fo:padding="0.0194in" fo:border="none"/>
    </style:style>
    <style:style style:name="Table4.A11" style:family="table-cell">
      <style:table-cell-properties style:vertical-align="middle" fo:padding="0.0194in" fo:border="none"/>
    </style:style>
    <style:style style:name="Table4.B11" style:family="table-cell">
      <style:table-cell-properties style:vertical-align="middle" fo:padding="0.0194in" fo:border="none"/>
    </style:style>
    <style:style style:name="Table5" style:family="table">
      <style:table-properties style:width="4.4368in" table:align="left"/>
    </style:style>
    <style:style style:name="Table5.A" style:family="table-column">
      <style:table-column-properties style:column-width="0.8167in"/>
    </style:style>
    <style:style style:name="Table5.B" style:family="table-column">
      <style:table-column-properties style:column-width="3.6201in"/>
    </style:style>
    <style:style style:name="Table5.A1" style:family="table-cell">
      <style:table-cell-properties style:vertical-align="middle" fo:background-color="#191970" fo:padding="0.0194in" fo:border="none">
        <style:background-image/>
      </style:table-cell-properties>
    </style:style>
    <style:style style:name="Table5.A2" style:family="table-cell">
      <style:table-cell-properties style:vertical-align="middle" fo:background-color="#dedee2" fo:padding="0.0194in" fo:border="none">
        <style:background-image/>
      </style:table-cell-properties>
    </style:style>
    <style:style style:name="Table5.A3" style:family="table-cell">
      <style:table-cell-properties style:vertical-align="middle" fo:padding="0.0194in" fo:border="none"/>
    </style:style>
    <style:style style:name="Table5.B3" style:family="table-cell">
      <style:table-cell-properties style:vertical-align="middle" fo:padding="0.0194in" fo:border="none"/>
    </style:style>
    <style:style style:name="Table5.A4" style:family="table-cell">
      <style:table-cell-properties style:vertical-align="middle" fo:padding="0.0194in" fo:border="none"/>
    </style:style>
    <style:style style:name="Table5.B4" style:family="table-cell">
      <style:table-cell-properties style:vertical-align="middle" fo:padding="0.0194in" fo:border="none"/>
    </style:style>
    <style:style style:name="Table5.A5" style:family="table-cell">
      <style:table-cell-properties style:vertical-align="middle" fo:padding="0.0194in" fo:border="none"/>
    </style:style>
    <style:style style:name="Table5.B5" style:family="table-cell">
      <style:table-cell-properties style:vertical-align="middle" fo:padding="0.0194in" fo:border="none"/>
    </style:style>
    <style:style style:name="Table5.A7" style:family="table-cell">
      <style:table-cell-properties style:vertical-align="middle" fo:padding="0.0194in" fo:border="none"/>
    </style:style>
    <style:style style:name="Table5.B7" style:family="table-cell">
      <style:table-cell-properties style:vertical-align="middle" fo:padding="0.0194in" fo:border="none"/>
    </style:style>
    <style:style style:name="Table5.A8" style:family="table-cell">
      <style:table-cell-properties style:vertical-align="middle" fo:padding="0.0194in" fo:border="none"/>
    </style:style>
    <style:style style:name="Table5.B8" style:family="table-cell">
      <style:table-cell-properties style:vertical-align="middle" fo:padding="0.0194in" fo:border="none"/>
    </style:style>
    <style:style style:name="Table5.A10" style:family="table-cell">
      <style:table-cell-properties style:vertical-align="middle" fo:padding="0.0194in" fo:border="none"/>
    </style:style>
    <style:style style:name="Table5.B10" style:family="table-cell">
      <style:table-cell-properties style:vertical-align="middle" fo:padding="0.0194in" fo:border="none"/>
    </style:style>
    <style:style style:name="P1" style:family="paragraph" style:parent-style-name="Text_20_body">
      <style:paragraph-properties fo:margin-left="0in" fo:margin-right="0in" fo:text-indent="0in" style:auto-text-indent="false" style:writing-mode="lr-tb"/>
    </style:style>
    <style:style style:name="P2" style:family="paragraph" style:parent-style-name="Text_20_body">
      <style:paragraph-properties style:writing-mode="lr-tb"/>
      <style:text-properties fo:language="en" fo:country="US"/>
    </style:style>
    <style:style style:name="P3" style:family="paragraph" style:parent-style-name="Table_20_Contents">
      <style:paragraph-properties fo:margin-top="0in" fo:margin-bottom="0.1965in" style:contextual-spacing="false"/>
    </style:style>
    <style:style style:name="P4" style:family="paragraph" style:parent-style-name="Table_20_Contents">
      <style:paragraph-properties fo:margin-top="0in" fo:margin-bottom="0.1965in" style:contextual-spacing="false"/>
      <style:text-properties fo:font-style="italic"/>
    </style:style>
    <style:style style:name="P5" style:family="paragraph" style:parent-style-name="Heading_20_1">
      <style:paragraph-properties fo:margin-left="0in" fo:margin-right="0in" fo:margin-top="0in" fo:margin-bottom="0.0972in" style:contextual-spacing="false" fo:line-height="115%" fo:text-indent="0in" style:auto-text-indent="false"/>
    </style:style>
    <style:style style:name="P6" style:family="paragraph" style:parent-style-name="Text_20_body">
      <style:paragraph-properties fo:margin-left="0in" fo:margin-right="0in" fo:margin-top="0in" fo:margin-bottom="0.0972in" style:contextual-spacing="false" fo:line-height="115%"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Standard">
      <style:paragraph-properties fo:margin-left="0in" fo:margin-right="0in" fo:margin-top="0in" fo:margin-bottom="0in" style:contextual-spacing="false" fo:text-indent="0in" style:auto-text-indent="false"/>
      <style:text-properties fo:font-size="2pt" style:font-size-asian="2pt" style:font-size-complex="2pt"/>
    </style:style>
    <style:style style:name="P9" style:family="paragraph" style:parent-style-name="Text_20_body">
      <style:paragraph-properties fo:margin-top="0in" fo:margin-bottom="0in" style:contextual-spacing="false" fo:text-align="center" style:justify-single-word="false"/>
    </style:style>
    <style:style style:name="P10" style:family="paragraph" style:parent-style-name="Table_20_Heading">
      <style:paragraph-properties fo:margin-left="0in" fo:margin-right="0in" fo:line-height="150%" fo:text-align="center" style:justify-single-word="false" fo:text-indent="0in" style:auto-text-indent="false"/>
      <style:text-properties fo:color="#ffffff" loext:opacity="100%" style:font-name="arial black" fo:font-size="14pt"/>
    </style:style>
    <style:style style:name="P11" style:family="paragraph" style:parent-style-name="Table_20_Contents">
      <style:paragraph-properties fo:margin-left="0in" fo:margin-right="0in" fo:margin-top="0in" fo:margin-bottom="0.0972in" style:contextual-spacing="false" style:line-height-at-least="0.0984in" fo:text-indent="0in" style:auto-text-indent="false"/>
    </style:style>
    <style:style style:name="P12" style:family="paragraph" style:parent-style-name="Table_20_Heading">
      <style:paragraph-properties fo:margin-left="0in" fo:margin-right="0in" fo:text-indent="0in" style:auto-text-indent="false"/>
    </style:style>
    <style:style style:name="P13" style:family="paragraph" style:parent-style-name="Table_20_Heading">
      <style:paragraph-properties fo:margin-left="0in" fo:margin-right="0in" fo:text-align="start" style:justify-single-word="false" fo:text-indent="0in" style:auto-text-indent="false"/>
      <style:text-properties fo:font-size="10pt"/>
    </style:style>
    <style:style style:name="P14" style:family="paragraph" style:parent-style-name="Table_20_Contents">
      <style:paragraph-properties fo:margin-left="0in" fo:margin-right="0in" fo:text-align="start" style:justify-single-word="false" fo:text-indent="0in" style:auto-text-indent="false"/>
    </style:style>
    <style:style style:name="P15" style:family="paragraph" style:parent-style-name="Table_20_Contents">
      <style:paragraph-properties fo:text-align="start" style:justify-single-word="false"/>
    </style:style>
    <style:style style:name="P16" style:family="paragraph" style:parent-style-name="Text_20_body">
      <style:paragraph-properties style:writing-mode="lr-tb"/>
    </style:style>
    <style:style style:name="P17" style:family="paragraph" style:parent-style-name="Heading_20_2">
      <style:paragraph-properties fo:margin-left="0in" fo:margin-right="0in" fo:margin-top="0in" fo:margin-bottom="0.0972in" style:contextual-spacing="false" fo:line-height="115%" fo:text-indent="0in" style:auto-text-indent="false" style:writing-mode="lr-tb"/>
      <style:text-properties fo:language="en" fo:country="US"/>
    </style:style>
    <style:style style:name="P18" style:family="paragraph" style:parent-style-name="Text_20_body">
      <style:paragraph-properties fo:margin-left="0in" fo:margin-right="0in" fo:margin-top="0in" fo:margin-bottom="0.0972in" style:contextual-spacing="false" fo:line-height="115%" fo:text-indent="0in" style:auto-text-indent="false"/>
      <style:text-properties fo:font-weight="bold"/>
    </style:style>
    <style:style style:name="P19" style:family="paragraph" style:parent-style-name="Quotations">
      <style:paragraph-properties fo:margin-top="0in" fo:margin-bottom="0.0972in" style:contextual-spacing="false" fo:line-height="115%"/>
    </style:style>
    <style:style style:name="P20" style:family="paragraph" style:parent-style-name="Text_20_body">
      <style:paragraph-properties fo:margin-left="0in" fo:margin-right="0in" fo:text-indent="0in" style:auto-text-indent="false"/>
      <style:text-properties fo:font-size="2pt" style:font-size-asian="2pt" style:font-size-complex="2pt"/>
    </style:style>
    <style:style style:name="P21" style:family="paragraph" style:parent-style-name="Text_20_body">
      <style:paragraph-properties fo:margin-top="0in" fo:margin-bottom="0in" style:contextual-spacing="false" fo:text-align="center" style:justify-single-word="false"/>
      <style:text-properties fo:font-weight="bold"/>
    </style:style>
    <style:style style:name="P22" style:family="paragraph" style:parent-style-name="Heading_20_3">
      <style:paragraph-properties fo:margin-left="0in" fo:margin-right="0in" fo:margin-top="0in" fo:margin-bottom="0.0972in" style:contextual-spacing="false" fo:line-height="115%" fo:text-indent="0in" style:auto-text-indent="false" style:writing-mode="lr-tb"/>
      <style:text-properties fo:language="en" fo:country="US"/>
    </style:style>
    <style:style style:name="T1" style:family="text">
      <style:text-properties fo:language="en" fo:country="US"/>
    </style:style>
    <style:style style:name="T2" style:family="text">
      <style:text-properties fo:font-weight="bold"/>
    </style:style>
    <style:style style:name="T3" style:family="text">
      <style:text-properties fo:language="en" fo:country="US" fo:font-weight="bold"/>
    </style:style>
    <style:style style:name="T4" style:family="text">
      <style:text-properties fo:font-style="italic"/>
    </style:style>
    <style:style style:name="T5" style:family="text">
      <style:text-properties fo:font-style="italic" fo:font-weight="bold"/>
    </style:style>
    <style:style style:name="T6" style:family="text">
      <style:text-properties fo:language="en" fo:country="US" fo:font-style="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section text:style-name="Sect1" text:name="userscript-content">
        <text:section text:style-name="Sect1" text:name="userscript-mw-content-text">
          <text:p text:style-name="P1"><text:span text:style-name="T1">There are 360 days in the Oerthen year</text:span><text:bookmark text:name="userscript-cite_ref-:0_1-0"/><text:a xlink:type="simple" xlink:href="https://greyhawk.fandom.com/wiki/Calendar#cite_note-:0-1" text:style-name="Internet_20_link" text:visited-style-name="Visited_20_Internet_20_Link"><text:span text:style-name="T1">[1]</text:span></text:a><text:span text:style-name="T1">. The months are known as the 12 Lairs of the Zodiac. </text:span></text:p>
          <text:p text:style-name="P2"><text:span text:style-name="T2">MOONS</text:span> </text:p>
          <text:p text:style-name="P2">There are two moons, the Great Moon (Luna, The Mistress) and the Handmaiden (Celene). Luna is similar to our moon, waxing and waning in cycles of 28 days, while Celene is a smaller aquamarine satellite that is full only four times a year. </text:p>
          <text:p text:style-name="P2"><text:span text:style-name="T2">STARS</text:span> </text:p>
          <text:p text:style-name="P2">There are five great stars that wander The Lairs of the Zodiac. </text:p>
          <text:p text:style-name="P1"><text:span text:style-name="T3">FLAN DAYS OF THE YEAR</text:span><text:bookmark text:name="userscript-cite_ref-:0_1-1"/><text:a xlink:type="simple" xlink:href="https://greyhawk.fandom.com/wiki/Calendar#cite_note-:0-1" text:style-name="Internet_20_link" text:visited-style-name="Visited_20_Internet_20_Link"><text:span text:style-name="T1">[1]</text:span></text:a><text:span text:style-name="T1"> </text:span></text:p>
          <table:table table:name="Table1" table:style-name="Table1">
            <table:table-column table:style-name="Table1.A"/>
            <table:table-column table:style-name="Table1.B"/>
            <table:table-row>
              <table:table-cell table:style-name="Table1.A1" office:value-type="string">
                <text:p text:style-name="Table_20_Heading">NAME </text:p>
              </table:table-cell>
              <table:table-cell table:style-name="Table1.A1" office:value-type="string">
                <text:p text:style-name="Table_20_Heading">BEHAVIOR </text:p>
              </table:table-cell>
            </table:table-row>
            <table:table-row>
              <table:table-cell table:style-name="Table1.A1" office:value-type="string">
                <text:p text:style-name="Table_20_Contents">STARDAY </text:p>
              </table:table-cell>
              <table:table-cell table:style-name="Table1.A1" office:value-type="string">
                <text:p text:style-name="Table_20_Contents">Work </text:p>
              </table:table-cell>
            </table:table-row>
            <table:table-row>
              <table:table-cell table:style-name="Table1.A1" office:value-type="string">
                <text:p text:style-name="Table_20_Contents">SUNDAY </text:p>
              </table:table-cell>
              <table:table-cell table:style-name="Table1.A1" office:value-type="string">
                <text:p text:style-name="Table_20_Contents">Work </text:p>
              </table:table-cell>
            </table:table-row>
            <table:table-row>
              <table:table-cell table:style-name="Table1.A1" office:value-type="string">
                <text:p text:style-name="Table_20_Contents">MOONDAY </text:p>
              </table:table-cell>
              <table:table-cell table:style-name="Table1.A1" office:value-type="string">
                <text:p text:style-name="Table_20_Contents">Work </text:p>
              </table:table-cell>
            </table:table-row>
            <table:table-row>
              <table:table-cell table:style-name="Table1.A1" office:value-type="string">
                <text:p text:style-name="Table_20_Contents">GODSDAY </text:p>
              </table:table-cell>
              <table:table-cell table:style-name="Table1.A1" office:value-type="string">
                <text:p text:style-name="Table_20_Contents">Worship </text:p>
              </table:table-cell>
            </table:table-row>
            <table:table-row>
              <table:table-cell table:style-name="Table1.A1" office:value-type="string">
                <text:p text:style-name="Table_20_Contents">WATERDAY </text:p>
              </table:table-cell>
              <table:table-cell table:style-name="Table1.A1" office:value-type="string">
                <text:p text:style-name="Table_20_Contents">Work </text:p>
              </table:table-cell>
            </table:table-row>
            <table:table-row>
              <table:table-cell table:style-name="Table1.A1" office:value-type="string">
                <text:p text:style-name="Table_20_Contents">EARTHDAY </text:p>
              </table:table-cell>
              <table:table-cell table:style-name="Table1.A1" office:value-type="string">
                <text:p text:style-name="Table_20_Contents">Work </text:p>
              </table:table-cell>
            </table:table-row>
            <table:table-row>
              <table:table-cell table:style-name="Table1.A1" office:value-type="string">
                <text:p text:style-name="Table_20_Contents">FREEDAY </text:p>
              </table:table-cell>
              <table:table-cell table:style-name="Table1.A1" office:value-type="string">
                <text:p text:style-name="Table_20_Contents">Rest </text:p>
              </table:table-cell>
            </table:table-row>
          </table:table>
          <text:p text:style-name="P1"><text:span text:style-name="T3">FESTIVALS</text:span><text:bookmark text:name="userscript-cite_ref-:0_1-2"/><text:a xlink:type="simple" xlink:href="https://greyhawk.fandom.com/wiki/Calendar#cite_note-:0-1" text:style-name="Internet_20_link" text:visited-style-name="Visited_20_Internet_20_Link"><text:span text:style-name="T1">[1]</text:span></text:a><text:span text:style-name="T1"> </text:span></text:p>
          <text:p text:style-name="P2">There are four seasons, known as festivals - Needfest, Growfest, Richfest, Brewfest </text:p>
          <text:p text:style-name="P1"><text:span text:style-name="T3">DOZENMONTHS OF THE MOON</text:span><text:bookmark text:name="userscript-cite_ref-:0_1-3"/><text:a xlink:type="simple" xlink:href="https://greyhawk.fandom.com/wiki/Calendar#cite_note-:0-1" text:style-name="Internet_20_link" text:visited-style-name="Visited_20_Internet_20_Link"><text:span text:style-name="T1">[1]</text:span></text:a><text:span text:style-name="T1"> </text:span></text:p>
          <text:p text:style-name="P2">There are 12 "Dozenmonths" of the Great Moon "Luna", named differently by different peoples, with four Festivals in-between. Each dozenmonth is 28 days, and each festival is 6 days long. </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Heading">FESTIVAL </text:p>
              </table:table-cell>
              <table:table-cell table:style-name="Table2.A1" office:value-type="string">
                <text:p text:style-name="Table_20_Heading">COMMON </text:p>
              </table:table-cell>
              <table:table-cell table:style-name="Table2.A1" office:value-type="string">
                <text:p text:style-name="Table_20_Heading">OLVEN </text:p>
              </table:table-cell>
              <table:table-cell table:style-name="Table2.A1" office:value-type="string">
                <text:p text:style-name="Table_20_Heading">NOMADS </text:p>
              </table:table-cell>
              <table:table-cell table:style-name="Table2.A1" office:value-type="string">
                <text:p text:style-name="Table_20_Heading">Season </text:p>
              </table:table-cell>
            </table:table-row>
            <table:table-row>
              <table:table-cell table:style-name="Table2.A1" office:value-type="string">
                <text:p text:style-name="Table_20_Contents">NEEDFEST </text:p>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P3">Fireseek </text:p>
                <text:p text:style-name="P3">Readying </text:p>
                <text:p text:style-name="P3">Coldeven </text:p>
              </table:table-cell>
              <table:table-cell table:style-name="Table2.A1" office:value-type="string">
                <text:p text:style-name="P3">Diamondice </text:p>
                <text:p text:style-name="P3">Yellowillow </text:p>
                <text:p text:style-name="P3">Snowflowers </text:p>
              </table:table-cell>
              <table:table-cell table:style-name="Table2.A1" office:value-type="string">
                <text:p text:style-name="P3">Tiger </text:p>
                <text:p text:style-name="P3">Bear </text:p>
                <text:p text:style-name="P3">Lion </text:p>
              </table:table-cell>
              <table:table-cell table:style-name="Table2.A1" office:value-type="string">
                <text:p text:style-name="P3"><text:span text:style-name="T4">Winter</text:span> </text:p>
                <text:p text:style-name="P3"><text:span text:style-name="T4">Spring</text:span> </text:p>
                <text:p text:style-name="P3"><text:span text:style-name="T4">Spring</text:span> </text:p>
              </table:table-cell>
            </table:table-row>
            <table:table-row>
              <table:table-cell table:style-name="Table2.A1" office:value-type="string">
                <text:p text:style-name="Table_20_Contents">GROWFEST </text:p>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P3">Planting </text:p>
                <text:p text:style-name="P3">Flocktime </text:p>
                <text:p text:style-name="P3">Wealsun </text:p>
              </table:table-cell>
              <table:table-cell table:style-name="Table2.A1" office:value-type="string">
                <text:p text:style-name="P3">Blossoms </text:p>
                <text:p text:style-name="P3">Violets </text:p>
                <text:p text:style-name="P3">Berrytime </text:p>
              </table:table-cell>
              <table:table-cell table:style-name="Table2.A1" office:value-type="string">
                <text:p text:style-name="P3">Frog </text:p>
                <text:p text:style-name="P3">Turtle </text:p>
                <text:p text:style-name="P3">Fox </text:p>
              </table:table-cell>
              <table:table-cell table:style-name="Table2.A1" office:value-type="string">
                <text:p text:style-name="P3"><text:span text:style-name="T4">Low Summer</text:span> </text:p>
                <text:p text:style-name="P3"><text:span text:style-name="T4">Low Summer</text:span> </text:p>
                <text:p text:style-name="P3"><text:span text:style-name="T4">Low Summer</text:span> </text:p>
              </table:table-cell>
            </table:table-row>
            <table:table-row>
              <table:table-cell table:style-name="Table2.A1" office:value-type="string">
                <text:p text:style-name="Table_20_Contents">RICHFEST </text:p>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text:span text:style-name="T4">Midsummer</text:span> </text:p>
              </table:table-cell>
            </table:table-row>
            <text:soft-page-break/>
            <table:table-row>
              <table:table-cell table:style-name="Table2.A1" office:value-type="string">
                <text:p text:style-name="Table_20_Contents"/>
              </table:table-cell>
              <table:table-cell table:style-name="Table2.A1" office:value-type="string">
                <text:p text:style-name="P3">Reaping </text:p>
                <text:p text:style-name="P3">Goodmonth </text:p>
                <text:p text:style-name="P3">Harvester </text:p>
              </table:table-cell>
              <table:table-cell table:style-name="Table2.A1" office:value-type="string">
                <text:p text:style-name="P3">Goldfields </text:p>
                <text:p text:style-name="P3">Sunflowers </text:p>
                <text:p text:style-name="P3">Fruitfall </text:p>
              </table:table-cell>
              <table:table-cell table:style-name="Table2.A1" office:value-type="string">
                <text:p text:style-name="P3">Snake </text:p>
                <text:p text:style-name="P3">Boar </text:p>
                <text:p text:style-name="P3">Squirrel </text:p>
              </table:table-cell>
              <table:table-cell table:style-name="Table2.A1" office:value-type="string">
                <text:p text:style-name="P3"><text:span text:style-name="T4">High Summer</text:span> </text:p>
                <text:p text:style-name="P3"><text:span text:style-name="T4">High Summer</text:span> </text:p>
                <text:p text:style-name="P3"><text:span text:style-name="T4">High Summer</text:span> </text:p>
              </table:table-cell>
            </table:table-row>
            <table:table-row>
              <table:table-cell table:style-name="Table2.A1" office:value-type="string">
                <text:p text:style-name="Table_20_Contents">BREWFEST </text:p>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P3">Patchwall </text:p>
                <text:p text:style-name="P3">Ready'reat </text:p>
                <text:p text:style-name="P3">Sunsebb </text:p>
              </table:table-cell>
              <table:table-cell table:style-name="Table2.A1" office:value-type="string">
                <text:p text:style-name="P3">Brightleaf </text:p>
                <text:p text:style-name="P3">Tinklingice </text:p>
                <text:p text:style-name="P3">Lacysnows </text:p>
              </table:table-cell>
              <table:table-cell table:style-name="Table2.A1" office:value-type="string">
                <text:p text:style-name="P3">Hare </text:p>
                <text:p text:style-name="P3">Hawk </text:p>
                <text:p text:style-name="P3">Worf </text:p>
              </table:table-cell>
              <table:table-cell table:style-name="Table2.A1" office:value-type="string">
                <text:p text:style-name="P3"><text:span text:style-name="T4">Autumn'</text:span><text:span text:style-name="T5">Autumn</text:span> </text:p>
                <text:p text:style-name="P4">Winter</text:p>
              </table:table-cell>
            </table:table-row>
          </table:table>
          <text:p text:style-name="Text_20_body"/>
        </text:section>
      </text:section>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p text:style-name="P6"/>
      <text:p text:style-name="P6"/>
      <text:p text:style-name="P6"/>
      <text:p text:style-name="P6"/>
      <text:p text:style-name="P6"/>
      <text:p text:style-name="P6"/>
      <text:p text:style-name="P6"/>
      <text:p text:style-name="P6"/>
      <text:h text:style-name="P5" text:outline-level="1"><text:bookmark text:name="userscript-firstHeading"/><text:soft-page-break/>Liga</text:h>
      <text:section text:style-name="Sect1" text:name="userscript-bodyContent">
        <text:p text:style-name="P7"/>
        <text:section text:style-name="Sect1" text:name="Section1">
          <text:p text:style-name="P8"><text:bookmark text:name="userscript-mw-content-text"/></text:p>
          <text:p text:style-name="P9"/>
          <table:table table:name="Table3" table:style-name="Table3">
            <table:table-column table:style-name="Table3.A"/>
            <table:table-column table:style-name="Table3.B"/>
            <table:table-row>
              <table:table-cell table:style-name="Table3.A1" table:number-columns-spanned="2" office:value-type="string">
                <text:p text:style-name="P10">Liga</text:p>
              </table:table-cell>
              <table:covered-table-cell/>
            </table:table-row>
            <table:table-row>
              <table:table-cell table:style-name="Table3.A1" table:number-columns-spanned="2" office:value-type="string">
                <text:p text:style-name="P11"><draw:frame draw:style-name="fr1" draw:name="Image1" text:anchor-type="as-char" svg:width="2.4374in" svg:height="3.75in" draw:z-index="0"><draw:image xlink:href="Pictures/100000010000008F000000DC14CB025F.png" xlink:type="simple" xlink:show="embed" xlink:actuate="onLoad" draw:mime-type="image/png"/></draw:frame></text:p>
              </table:table-cell>
              <table:covered-table-cell/>
            </table:table-row>
            <table:table-row>
              <table:table-cell table:style-name="Table3.A3" table:number-columns-spanned="2" office:value-type="string">
                <text:p text:style-name="P12">Planetary information</text:p>
              </table:table-cell>
              <table:covered-table-cell/>
            </table:table-row>
            <table:table-row>
              <table:table-cell table:style-name="Table3.A4" office:value-type="string">
                <text:p text:style-name="P13">Alias(es):</text:p>
              </table:table-cell>
              <table:table-cell table:style-name="Table3.B4" office:value-type="string">
                <text:p text:style-name="P14">the Sun</text:p>
              </table:table-cell>
            </table:table-row>
            <table:table-row>
              <table:table-cell table:style-name="Table3.A4" office:value-type="string">
                <text:p text:style-name="P13">Type:</text:p>
              </table:table-cell>
              <table:table-cell table:style-name="Table3.B4" office:value-type="string">
                <text:p text:style-name="P14">Spherical Fire Body</text:p>
              </table:table-cell>
            </table:table-row>
            <table:table-row>
              <table:table-cell table:style-name="Table3.A4" office:value-type="string">
                <text:p text:style-name="P13">Size:</text:p>
              </table:table-cell>
              <table:table-cell table:style-name="Table3.B4" office:value-type="string">
                <text:p text:style-name="P14">75,000 miles in diameter</text:p>
              </table:table-cell>
            </table:table-row>
            <table:table-row>
              <table:table-cell table:style-name="Table3.A3" table:number-columns-spanned="2" office:value-type="string">
                <text:p text:style-name="P12">System information</text:p>
              </table:table-cell>
              <table:covered-table-cell/>
            </table:table-row>
            <table:table-row>
              <table:table-cell table:style-name="Table3.A4" office:value-type="string">
                <text:p text:style-name="P13">Day:</text:p>
              </table:table-cell>
              <table:table-cell table:style-name="Table3.B4" office:value-type="string">
                <text:p text:style-name="P14">None</text:p>
              </table:table-cell>
            </table:table-row>
            <table:table-row>
              <table:table-cell table:style-name="Table3.A4" office:value-type="string">
                <text:p text:style-name="P13">Year:</text:p>
              </table:table-cell>
              <table:table-cell table:style-name="Table3.B4" office:value-type="string">
                <text:p text:style-name="P14">364 <text:a xlink:type="simple" xlink:href="https://www.greyhawkonline.com/greyhawkwiki/Oerth" text:style-name="Internet_20_link" text:visited-style-name="Visited_20_Internet_20_Link">Oerth</text:a> days</text:p>
              </table:table-cell>
            </table:table-row>
            <table:table-row>
              <table:table-cell table:style-name="Table3.A4" office:value-type="string">
                <text:p text:style-name="P13">Satellites:</text:p>
              </table:table-cell>
              <table:table-cell table:style-name="Table3.B4" office:value-type="string">
                <text:p text:style-name="P14">The <text:a xlink:type="simple" xlink:href="https://www.greyhawkonline.com/greyhawkwiki/index.php?title=Moth&amp;action=edit&amp;redlink=1" text:style-name="Internet_20_link" text:visited-style-name="Visited_20_Internet_20_Link">Moth</text:a></text:p>
              </table:table-cell>
            </table:table-row>
            <table:table-row>
              <table:table-cell table:style-name="Table3.A3" table:number-columns-spanned="2" office:value-type="string">
                <text:p text:style-name="P12">Fauna</text:p>
              </table:table-cell>
              <table:covered-table-cell/>
            </table:table-row>
            <table:table-row>
              <table:table-cell table:style-name="Table3.A4" office:value-type="string">
                <text:p text:style-name="P13">Inhabitants:</text:p>
              </table:table-cell>
              <table:table-cell table:style-name="Table3.B4" office:value-type="string">
                <text:p text:style-name="P15">Salamanders, fire elementals, efreet</text:p>
              </table:table-cell>
            </table:table-row>
          </table:table>
          <text:p text:style-name="P16"><text:span text:style-name="T3">Liga</text:span><text:span text:style-name="T1"> is </text:span><text:a xlink:type="simple" xlink:href="https://www.greyhawkonline.com/greyhawkwiki/Oerth" text:style-name="Internet_20_link" text:visited-style-name="Visited_20_Internet_20_Link"><text:span text:style-name="T1">Oerth</text:span></text:a><text:span text:style-name="T1">'s sun. It orbits the Oerth at 100 million miles, taking 364 days (one Oerth year) to complete its journey. It has one satellite, a planetoid known as the </text:span><text:a xlink:type="simple" xlink:href="https://www.greyhawkonline.com/greyhawkwiki/index.php?title=Moth&amp;action=edit&amp;redlink=1" text:style-name="Internet_20_link" text:visited-style-name="Visited_20_Internet_20_Link"><text:span text:style-name="T6">Moth</text:span></text:a><text:span text:style-name="T1">. In Oerth's planetary system, it is between </text:span><text:a xlink:type="simple" xlink:href="https://www.greyhawkonline.com/greyhawkwiki/Luna" text:style-name="Internet_20_link" text:visited-style-name="Visited_20_Internet_20_Link"><text:span text:style-name="T1">Luna</text:span></text:a><text:span text:style-name="T1"> and the </text:span><text:a xlink:type="simple" xlink:href="https://www.greyhawkonline.com/greyhawkwiki/Grinder" text:style-name="Internet_20_link" text:visited-style-name="Visited_20_Internet_20_Link"><text:span text:style-name="T1">Grinder</text:span></text:a><text:span text:style-name="T1">, an asteroid field. </text:span></text:p>
          <text:p text:style-name="P16"><text:span text:style-name="T1">On Oerth, Liga is commonly thought to have been created by the god </text:span><text:a xlink:type="simple" xlink:href="https://www.greyhawkonline.com/greyhawkwiki/Pelor" text:style-name="Internet_20_link" text:visited-style-name="Visited_20_Internet_20_Link"><text:span text:style-name="T1">Pelor</text:span></text:a><text:span text:style-name="T1"> or to be Pelor. Devotees of </text:span><text:a xlink:type="simple" xlink:href="https://www.greyhawkonline.com/greyhawkwiki/Rao" text:style-name="Internet_20_link" text:visited-style-name="Visited_20_Internet_20_Link"><text:span text:style-name="T1">Rao</text:span></text:a><text:span text:style-name="T1"> believe Liga is the light of their god's soul. Worshippers of </text:span><text:a xlink:type="simple" xlink:href="https://www.greyhawkonline.com/greyhawkwiki/Pholtus" text:style-name="Internet_20_link" text:visited-style-name="Visited_20_Internet_20_Link"><text:span text:style-name="T1">Pholtus</text:span></text:a><text:span text:style-name="T1"> say that their god set the sun in the sky and maintains it on its yearly path. The </text:span><text:a xlink:type="simple" xlink:href="https://www.greyhawkonline.com/greyhawkwiki/Touv" text:style-name="Internet_20_link" text:visited-style-name="Visited_20_Internet_20_Link"><text:span text:style-name="T1">Touv</text:span></text:a><text:span text:style-name="T1"> associate the sun with their goddess </text:span><text:a xlink:type="simple" xlink:href="https://www.greyhawkonline.com/greyhawkwiki/Nola" text:style-name="Internet_20_link" text:visited-style-name="Visited_20_Internet_20_Link"><text:span text:style-name="T1">Nola</text:span></text:a><text:span text:style-name="T1">. The </text:span><text:soft-page-break/><text:a xlink:type="simple" xlink:href="https://www.greyhawkonline.com/greyhawkwiki/Olman" text:style-name="Internet_20_link" text:visited-style-name="Visited_20_Internet_20_Link"><text:span text:style-name="T1">Olman</text:span></text:a><text:span text:style-name="T1"> believe in a procession of suns, each age of Creation dominated by a different one, with the current one being the fifth to exist. </text:span></text:p>
          <text:section text:style-name="Sect1" text:name="userscript-toc">
            <text:p text:style-name="P1"/>
          </text:section>
          <text:h text:style-name="P17" text:outline-level="2"><text:bookmark text:name="userscript-Physical_features"/>Physical features</text:h>
          <text:p text:style-name="P2">Liga consists of a core of molten metals about 1,000 miles in diameter surrounded by a photosphere, a superhot atmosphere that surrounds the core up to 37,000 miles. The heat of the sun is deadly up to 29,000 miles away; beyond that point it provides heat to the rest of the system but does not pose an imminent danger of immolation to organic life. </text:p>
          <text:p text:style-name="P16"><text:span text:style-name="T1">There are portals to the </text:span><text:a xlink:type="simple" xlink:href="https://www.greyhawkonline.com/greyhawkwiki/Elemental_Plane_of_Fire" text:style-name="Internet_20_link" text:visited-style-name="Visited_20_Internet_20_Link"><text:span text:style-name="T1">Elemental Plane of Fire</text:span></text:a><text:span text:style-name="T1"> on the surface of the core, and some speculate a large gate in the center of the core may keep the sun hot. Unlike many suns, Liga does not feature sunspots, solar flares, or atmospheric storms. </text:span></text:p>
          <text:p text:style-name="P16"><text:span text:style-name="T1">Spherical lakes of elemental water do somehow manage to avoid evaporating on the surface of the photosphere. They resemble pinpricks from space, and are invisible from the surface of the Oerth, but are tens of miles across. Sustained by temporary portals to the </text:span><text:a xlink:type="simple" xlink:href="https://www.greyhawkonline.com/greyhawkwiki/Elemental_Plane_of_Water" text:style-name="Internet_20_link" text:visited-style-name="Visited_20_Internet_20_Link"><text:span text:style-name="T1">Elemental Plane of Water</text:span></text:a><text:span text:style-name="T1">, these lakes remain a cool 65 degrees Fahrenheit until the portals move somewhere else on the sun, at which point they quickly boil away. The origin and purpose of these lakes are unknown, but some believe the gods of Oerth sustain them to regulate the temperature of the sun. </text:span></text:p>
          <text:h text:style-name="P17" text:outline-level="2"><text:bookmark text:name="userscript-Inhabitants"/>Inhabitants</text:h>
          <text:p text:style-name="P16"><text:span text:style-name="T1">Liga is populated by denizens of the Elemental Plane of Fire, including </text:span><text:a xlink:type="simple" xlink:href="https://www.greyhawkonline.com/greyhawkwiki/index.php?title=Salamander&amp;action=edit&amp;redlink=1" text:style-name="Internet_20_link" text:visited-style-name="Visited_20_Internet_20_Link"><text:span text:style-name="T1">salamanders</text:span></text:a><text:span text:style-name="T1">, fire elementals, and a flying castle inhabited by several dozen </text:span><text:a xlink:type="simple" xlink:href="https://www.greyhawkonline.com/greyhawkwiki/index.php?title=Efreeti&amp;action=edit&amp;redlink=1" text:style-name="Internet_20_link" text:visited-style-name="Visited_20_Internet_20_Link"><text:span text:style-name="T1">efreet</text:span></text:a><text:span text:style-name="T1">. The efreet have a great flying vessel made of brass, with sails that are sheets of flame. The lakes are inhabited by water elementals and </text:span><text:a xlink:type="simple" xlink:href="https://www.greyhawkonline.com/greyhawkwiki/index.php?title=Water_weird&amp;action=edit&amp;redlink=1" text:style-name="Internet_20_link" text:visited-style-name="Visited_20_Internet_20_Link"><text:span text:style-name="T1">water weirds</text:span></text:a><text:span text:style-name="T1">. The water elementals say they have been sent to dwell on Liga on the orders of a great noble superior, while the weirds are simply pests. </text:span></text:p>
          <text:h text:style-name="P17" text:outline-level="2"><text:bookmark text:name="userscript-The_Golden_Forge"/>The Golden Forge</text:h>
          <text:p text:style-name="P16"><text:span text:style-name="T1">According to legend, in the Heart of the Sun lies a Golden Forge, capable of destroying the </text:span><text:a xlink:type="simple" xlink:href="https://www.greyhawkonline.com/greyhawkwiki/Hand_of_Vecna" text:style-name="Internet_20_link" text:visited-style-name="Visited_20_Internet_20_Link"><text:span text:style-name="T1">Hand</text:span></text:a><text:span text:style-name="T1"> and </text:span><text:a xlink:type="simple" xlink:href="https://www.greyhawkonline.com/greyhawkwiki/Eye_of_Vecna" text:style-name="Internet_20_link" text:visited-style-name="Visited_20_Internet_20_Link"><text:span text:style-name="T1">Eye of Vecna</text:span></text:a><text:span text:style-name="T1">. </text:span></text:p>
          <text:h text:style-name="P17" text:outline-level="2"><text:bookmark text:name="userscript-The_Moth"/>The Moth</text:h>
          <text:p text:style-name="P2">The Moth is a small planetoid, only 200 miles in diameter. Due to its extreme closeness to the sun (15,000 miles) it is invisible from Oerth. It has no atmosphere or life. The Moth is tidally locked. One side, Brightside, is too hot for fleshy creatures to survive on unaided; the other side, Nightside, is as cold as Brightside is hot, far chiller than the surrounding space, capable of freezing human flesh with its unexplained killing frost. </text:p>
          <text:h text:style-name="P17" text:outline-level="2"><text:bookmark text:name="userscript-Anti-Liga"/><text:soft-page-break/>Anti-Liga</text:h>
          <text:p text:style-name="P2">There are several parallel myths from various cultures on Oerth telling of a second sun that once graced the skies in an age before history. This other sun, dubbed "Anti-Liga" by scholars, is said to have been an exact twin of Liga, separated from it on the same orbital path by 180 degrees. Many thousands of years ago, Anti-Liga vanished without a trace, and the myths do not agree on how or why this might have happened. Some believe it may have come untethered from its orbit and slammed into the next planet, shattering it and creating the asteroid field known as the Grinder. </text:p>
        </text:section>
      </text:section>
      <text:h text:style-name="P5" text:outline-level="1"><text:a xlink:type="simple" xlink:href="https://www.greyhawkonline.com/greyhawkwiki/Oerth" text:style-name="Internet_20_link" text:visited-style-name="Visited_20_Internet_20_Link"><text:span text:style-name="T2"/></text:a></text:h>
      <text:p text:style-name="P18"/>
      <text:p text:style-name="P18"/>
      <text:p text:style-name="P18"/>
      <text:p text:style-name="P18"/>
      <text:p text:style-name="P18"/>
      <text:p text:style-name="P18"/>
      <text:p text:style-name="P18"/>
      <text:h text:style-name="P5" text:outline-level="1"><text:a xlink:type="simple" xlink:href="https://www.greyhawkonline.com/greyhawkwiki/Oerth" text:style-name="Internet_20_link" text:visited-style-name="Visited_20_Internet_20_Link"><text:bookmark text:name="userscript-firstHeading Copy 1"/><text:soft-page-break/><text:span text:style-name="T2">Oerth</text:span></text:a><text:span text:style-name="T2">'s two moons</text:span>: <draw:frame draw:style-name="fr1" draw:name="Image2" text:anchor-type="as-char" svg:width="6.552in" svg:height="4.3957in" draw:z-index="1"><draw:image xlink:href="Pictures/10000001000001A000000117BEFAAE3D.png" xlink:type="simple" xlink:show="embed" xlink:actuate="onLoad" draw:mime-type="image/png"/></draw:frame></text:h>
      <text:p text:style-name="P19"/>
      <text:p text:style-name="P19">The world of Greyhawk (Oerth) has two moons, Luna and Celene, which dictate the campaign's calendar, magic, and holidays. <text:a xlink:type="simple" xlink:href="https://www.google.com/search?client=firefox-b-1-d&amp;hs=Bzbp&amp;sca_esv=2e8400090d6d80be&amp;sxsrf=ANbL-n7CKqkS3AenGvP_WldC68u82qaaog%3A1774810085149&amp;q=Luna&amp;source=lnms&amp;fbs=ADc_l-ZhSlbfqeZsLDJhbRo02Bk6hPEHQhiM_EOk6El4D3oe4V-YFILnesG94hofv-EFkjTaSmUOIqJqznbIBTMjd-AkwHckqwXR_zajK8AjngljvKLEDoOpsq_2mO_ld6vz6II8d1Q2Jw8rUILP9iJbdSPivNratfsw_RqdIXlw7DyR1qJ0nQDwWgKQYqtNkX-nQ-o1e-KZpqBAvQ-hfCX9R9-MewyfRldPxOFavpu7igghIPKThqE&amp;sa=X&amp;ved=2ahUKEwib0r3m4sWTAxWyl4kEHX87I_EQgK4QegYIAQgAEAk&amp;biw=1920&amp;bih=919&amp;dpr=1" text:style-name="Internet_20_link" text:visited-style-name="Visited_20_Internet_20_Link"><text:span text:style-name="Strong_20_Emphasis">Luna</text:span></text:a> (or <text:a xlink:type="simple" xlink:href="https://www.greyhawkonline.com/greyhawkwiki/Moon" text:style-name="Internet_20_link" text:visited-style-name="Visited_20_Internet_20_Link">Raenei</text:a>) is the larger silver moon with a 28-day cycle, while <text:a xlink:type="simple" xlink:href="https://www.google.com/search?client=firefox-b-1-d&amp;hs=Bzbp&amp;sca_esv=2e8400090d6d80be&amp;sxsrf=ANbL-n7CKqkS3AenGvP_WldC68u82qaaog%3A1774810085149&amp;q=Celene&amp;source=lnms&amp;fbs=ADc_l-ZhSlbfqeZsLDJhbRo02Bk6hPEHQhiM_EOk6El4D3oe4V-YFILnesG94hofv-EFkjTaSmUOIqJqznbIBTMjd-AkwHckqwXR_zajK8AjngljvKLEDoOpsq_2mO_ld6vz6II8d1Q2Jw8rUILP9iJbdSPivNratfsw_RqdIXlw7DyR1qJ0nQDwWgKQYqtNkX-nQ-o1e-KZpqBAvQ-hfCX9R9-MewyfRldPxOFavpu7igghIPKThqE&amp;sa=X&amp;ved=2ahUKEwib0r3m4sWTAxWyl4kEHX87I_EQgK4QegYIAQgAEAs&amp;biw=1920&amp;bih=919&amp;dpr=1" text:style-name="Internet_20_link" text:visited-style-name="Visited_20_Internet_20_Link"><text:span text:style-name="Strong_20_Emphasis">Celene</text:span></text:a> (or Kule) is smaller and aquamarine, with a 91-day cycle. </text:p>
      <text:h text:style-name="P5" text:outline-level="1"><text:bookmark text:name="userscript-firstHeading Copy 4"/><text:bookmark text:name="userscript-firstHeading Copy 3"/>Celene</text:h>
      <text:section text:style-name="Sect1" text:name="Section2">
        <text:p text:style-name="P20"><text:bookmark text:name="userscript-mw-content-text Copy 1"/></text:p>
        <text:section text:style-name="Sect1" text:name="Section3">
          <text:p text:style-name="P21">Greyspace Astronomical Object</text:p>
          <table:table table:name="Table4" table:style-name="Table4">
            <table:table-column table:style-name="Table4.A"/>
            <table:table-column table:style-name="Table4.B"/>
            <table:table-row>
              <table:table-cell table:style-name="Table4.A1" table:number-columns-spanned="2" office:value-type="string">
                <text:p text:style-name="P10">Celene</text:p>
              </table:table-cell>
              <table:covered-table-cell/>
            </table:table-row>
            <table:table-row>
              <table:table-cell table:style-name="Table4.A2" table:number-columns-spanned="2" office:value-type="string">
                <text:p text:style-name="P12">Planetary information</text:p>
              </table:table-cell>
              <table:covered-table-cell/>
            </table:table-row>
            <table:table-row>
              <table:table-cell table:style-name="Table4.A3" office:value-type="string">
                <text:p text:style-name="P13">Alias(es):</text:p>
              </table:table-cell>
              <table:table-cell table:style-name="Table4.B3" office:value-type="string">
                <text:p text:style-name="P14">Kule, the Handmaiden</text:p>
              </table:table-cell>
            </table:table-row>
            <table:table-row>
              <table:table-cell table:style-name="Table4.A3" office:value-type="string">
                <text:p text:style-name="P13">Type:</text:p>
              </table:table-cell>
              <table:table-cell table:style-name="Table4.B3" office:value-type="string">
                <text:p text:style-name="P14">Spherical earth body</text:p>
              </table:table-cell>
            </table:table-row>
            <table:table-row>
              <table:table-cell table:style-name="Table4.A3" office:value-type="string">
                <text:p text:style-name="P13">Size:</text:p>
              </table:table-cell>
              <table:table-cell table:style-name="Table4.B3" office:value-type="string">
                <text:p text:style-name="P14">B</text:p>
              </table:table-cell>
            </table:table-row>
            <table:table-row>
              <table:table-cell table:style-name="Table4.A2" table:number-columns-spanned="2" office:value-type="string">
                <text:p text:style-name="P12">System information</text:p>
              </table:table-cell>
              <table:covered-table-cell/>
            </table:table-row>
            <table:table-row>
              <table:table-cell table:style-name="Table4.A3" office:value-type="string">
                <text:p text:style-name="P13">Day:</text:p>
              </table:table-cell>
              <table:table-cell table:style-name="Table4.B3" office:value-type="string">
                <text:p text:style-name="P14">91 days (tidally locked)</text:p>
              </table:table-cell>
            </table:table-row>
            <table:table-row>
              <table:table-cell table:style-name="Table4.A3" office:value-type="string">
                <text:p text:style-name="P13">Year:</text:p>
              </table:table-cell>
              <table:table-cell table:style-name="Table4.B3" office:value-type="string">
                <text:p text:style-name="P14">91 days</text:p>
              </table:table-cell>
            </table:table-row>
            <table:table-row>
              <table:table-cell table:style-name="Table4.A3" office:value-type="string">
                <text:p text:style-name="P13">Satellites:</text:p>
              </table:table-cell>
              <table:table-cell table:style-name="Table4.B3" office:value-type="string">
                <text:p text:style-name="P14">None</text:p>
              </table:table-cell>
            </table:table-row>
            <text:soft-page-break/>
            <table:table-row>
              <table:table-cell table:style-name="Table4.A2" table:number-columns-spanned="2" office:value-type="string">
                <text:p text:style-name="P12">Fauna</text:p>
              </table:table-cell>
              <table:covered-table-cell/>
            </table:table-row>
            <table:table-row>
              <table:table-cell table:style-name="Table4.A3" office:value-type="string">
                <text:p text:style-name="P13">Inhabitants:</text:p>
              </table:table-cell>
              <table:table-cell table:style-name="Table4.B3" office:value-type="string">
                <text:p text:style-name="P15"><text:a xlink:type="simple" xlink:href="https://www.greyhawkonline.com/greyhawkwiki/Drow" text:style-name="Internet_20_link" text:visited-style-name="Visited_20_Internet_20_Link">Drow</text:a>, <text:a xlink:type="simple" xlink:href="https://www.greyhawkonline.com/greyhawkwiki/Illithid" text:style-name="Internet_20_link" text:visited-style-name="Visited_20_Internet_20_Link">illithids</text:a>, <text:a xlink:type="simple" xlink:href="https://www.greyhawkonline.com/greyhawkwiki/Kuo-toa" text:style-name="Internet_20_link" text:visited-style-name="Visited_20_Internet_20_Link">kuo-toa</text:a></text:p>
              </table:table-cell>
            </table:table-row>
          </table:table>
          <text:p text:style-name="P1"><text:span text:style-name="T3">Celene</text:span><text:span text:style-name="T1"> is one of </text:span><text:a xlink:type="simple" xlink:href="https://www.greyhawkonline.com/greyhawkwiki/Oerth" text:style-name="Internet_20_link" text:visited-style-name="Visited_20_Internet_20_Link"><text:span text:style-name="T1">Oerth</text:span></text:a><text:span text:style-name="T1">'s two </text:span><text:a xlink:type="simple" xlink:href="https://www.greyhawkonline.com/greyhawkwiki/Moon" text:style-name="Internet_20_link" text:visited-style-name="Visited_20_Internet_20_Link"><text:span text:style-name="T1">moons</text:span></text:a><text:span text:style-name="T1">—it is also called the </text:span><text:span text:style-name="T3">Handmaiden</text:span><text:span text:style-name="T1">, the </text:span><text:span text:style-name="T3">Lesser Moon</text:span><text:span text:style-name="T1">, or </text:span><text:span text:style-name="T3">Kule</text:span><text:span text:style-name="T1">. It is the aquamarine-hued satellite of </text:span><text:a xlink:type="simple" xlink:href="https://www.greyhawkonline.com/greyhawkwiki/Oerth" text:style-name="Internet_20_link" text:visited-style-name="Visited_20_Internet_20_Link"><text:span text:style-name="T1">Oerth</text:span></text:a><text:span text:style-name="T1">. It is known as </text:span><text:span text:style-name="T3">Apocatequil</text:span><text:bookmark text:name="userscript-cite_ref-sb-TSB-p64-s-n_1-0"/><text:a xlink:type="simple" xlink:href="https://www.greyhawkonline.com/greyhawkwiki/Celene_(moon)#cite_note-sb-TSB-p64-s-n-1" text:style-name="Internet_20_link" text:visited-style-name="Visited_20_Internet_20_Link"><text:span text:style-name="T1">[1]</text:span></text:a><text:span text:style-name="T1"> among the </text:span><text:a xlink:type="simple" xlink:href="https://www.greyhawkonline.com/greyhawkwiki/Olman" text:style-name="Internet_20_link" text:visited-style-name="Visited_20_Internet_20_Link"><text:span text:style-name="T1">Olman</text:span></text:a><text:span text:style-name="T1"> and </text:span><text:span text:style-name="T3">Koxanag</text:span><text:bookmark text:name="userscript-cite_ref-sb-TSB-p38-s-n_2-0"/><text:a xlink:type="simple" xlink:href="https://www.greyhawkonline.com/greyhawkwiki/Celene_(moon)#cite_note-sb-TSB-p38-s-n-2" text:style-name="Internet_20_link" text:visited-style-name="Visited_20_Internet_20_Link"><text:span text:style-name="T1">[2]</text:span></text:a><text:span text:style-name="T1"> among the </text:span><text:a xlink:type="simple" xlink:href="https://www.greyhawkonline.com/greyhawkwiki/Touv" text:style-name="Internet_20_link" text:visited-style-name="Visited_20_Internet_20_Link"><text:span text:style-name="T1">Touv</text:span></text:a><text:span text:style-name="T1">. From the perspective of Oerth, it is full four times a year, at the </text:span><text:a xlink:type="simple" xlink:href="https://www.greyhawkonline.com/greyhawkwiki/Greyhawk_calendar" text:style-name="Internet_20_link" text:visited-style-name="Visited_20_Internet_20_Link"><text:span text:style-name="T1">equinoxes and solstices</text:span></text:a><text:span text:style-name="T1">. Its companion, </text:span><text:a xlink:type="simple" xlink:href="https://www.greyhawkonline.com/greyhawkwiki/Luna" text:style-name="Internet_20_link" text:visited-style-name="Visited_20_Internet_20_Link"><text:span text:style-name="T1">Luna</text:span></text:a><text:span text:style-name="T1">, is the Greater Moon, the Mistress to Celene's Handmaiden. </text:span></text:p>
          <text:p text:style-name="P1"><text:span text:style-name="T1">Celene appears the same size from Oerth as does the sun, </text:span><text:a xlink:type="simple" xlink:href="https://www.greyhawkonline.com/greyhawkwiki/Liga" text:style-name="Internet_20_link" text:visited-style-name="Visited_20_Internet_20_Link"><text:span text:style-name="T1">Liga</text:span></text:a><text:span text:style-name="T1">. During an eclipse, only the corona of the sun is visible and is known as "Liga's Veil".</text:span><text:bookmark text:name="userscript-cite_ref-sb-SJR6-p10-s-n_3-0"/><text:a xlink:type="simple" xlink:href="https://www.greyhawkonline.com/greyhawkwiki/Celene_(moon)#cite_note-sb-SJR6-p10-s-n-3" text:style-name="Internet_20_link" text:visited-style-name="Visited_20_Internet_20_Link"><text:span text:style-name="T1">[3]</text:span></text:a><text:span text:style-name="T1"> </text:span></text:p>
          <text:section text:style-name="Sect1" text:name="Section4">
            <text:p text:style-name="P1"><text:bookmark text:name="userscript-toc"/></text:p>
          </text:section>
          <text:h text:style-name="P17" text:outline-level="2"><text:bookmark text:name="userscript-Surface_and_topography"/>Surface and topography</text:h>
          <text:p text:style-name="P1"><text:span text:style-name="T1">Celene is tidally locked, so it shows only one side to Oerth at all times. From Oerth, Celene appears a pale aquamarine hue, but from space it is a vivid blue. The side visible from Oerth has a number of craters and lighter blue or white ray-lines from meteoric impacts;</text:span><text:bookmark text:name="userscript-cite_ref-sb-SJR6-p11-s-n_4-0"/><text:a xlink:type="simple" xlink:href="https://www.greyhawkonline.com/greyhawkwiki/Celene_(moon)#cite_note-sb-SJR6-p11-s-n-4" text:style-name="Internet_20_link" text:visited-style-name="Visited_20_Internet_20_Link"><text:span text:style-name="T1">[4]</text:span></text:a><text:bookmark text:name="userscript-cite_ref-sb-SJR6-p14-s-n_5-0"/><text:a xlink:type="simple" xlink:href="https://www.greyhawkonline.com/greyhawkwiki/Celene_(moon)#cite_note-sb-SJR6-p14-s-n-5" text:style-name="Internet_20_link" text:visited-style-name="Visited_20_Internet_20_Link"><text:span text:style-name="T1">[5]</text:span></text:a><text:span text:style-name="T1"> there is also a dry seabed in the upper right-hand quadrant (known as Celene's Sea of Dust, not to be confused with Oerth's own </text:span><text:a xlink:type="simple" xlink:href="https://www.greyhawkonline.com/greyhawkwiki/Sea_of_Dust" text:style-name="Internet_20_link" text:visited-style-name="Visited_20_Internet_20_Link"><text:span text:style-name="T1">Sea of Dust</text:span></text:a><text:span text:style-name="T1">). Some of the craters have central mountain peaks or extinct volcanoes. The largest such crater on "Nearside" is in the lower right-hand quadrant; it, and the rays emanating from it, take up a full fifth of the visible surface. The largest volcano, Blackcone Mountain, is near the north pole and is some 13,000 feet high.</text:span><text:bookmark text:name="userscript-cite_ref-sb-SJR6-p14-s-n_5-1"/><text:a xlink:type="simple" xlink:href="https://www.greyhawkonline.com/greyhawkwiki/Celene_(moon)#cite_note-sb-SJR6-p14-s-n-5" text:style-name="Internet_20_link" text:visited-style-name="Visited_20_Internet_20_Link"><text:span text:style-name="T1">[5]</text:span></text:a><text:span text:style-name="T1"> </text:span></text:p>
          <text:p text:style-name="P2">On the opposite side, Celene is absolutely riddled with craters, which have hammered the mountain ranges flat. Whatever ancient cataclysm destroyed the civilization of Celene, the "Farside" bore the brunt of it. Paradoxically, however, the cities on Farside are better preserved than those on Nearside. </text:p>
          <text:p text:style-name="P1"><text:span text:style-name="T1">Celene has no atmosphere and is entirely a voidworld, which means there's no weather patterns of any kind.</text:span><text:bookmark text:name="userscript-cite_ref-sb-SJR6-p11-s-n_4-1"/><text:a xlink:type="simple" xlink:href="https://www.greyhawkonline.com/greyhawkwiki/Celene_(moon)#cite_note-sb-SJR6-p11-s-n-4" text:style-name="Internet_20_link" text:visited-style-name="Visited_20_Internet_20_Link"><text:span text:style-name="T1">[4]</text:span></text:a><text:span text:style-name="T1"> Temperatures on the surface range from 100°F (37.8°C) at "noon" to ⁻85°F (⁻65°C) or less at night. It is notable that since Celene is tidally locked, and it's Nearside always faces </text:span><text:a xlink:type="simple" xlink:href="https://www.greyhawkonline.com/greyhawkwiki/Oerth" text:style-name="Internet_20_link" text:visited-style-name="Visited_20_Internet_20_Link"><text:span text:style-name="T1">Oerth</text:span></text:a><text:span text:style-name="T1">, it's "day". or length of time the surface faces the sun (</text:span><text:a xlink:type="simple" xlink:href="https://www.greyhawkonline.com/greyhawkwiki/Liga" text:style-name="Internet_20_link" text:visited-style-name="Visited_20_Internet_20_Link"><text:span text:style-name="T1">Liga</text:span></text:a><text:span text:style-name="T1">), is approximately 45 days long, as are its nights.</text:span><text:bookmark text:name="userscript-cite_ref-sb-SJR6-p11-s-n_4-2"/><text:a xlink:type="simple" xlink:href="https://www.greyhawkonline.com/greyhawkwiki/Celene_(moon)#cite_note-sb-SJR6-p11-s-n-4" text:style-name="Internet_20_link" text:visited-style-name="Visited_20_Internet_20_Link"><text:span text:style-name="T1">[4]</text:span></text:a><text:span text:style-name="T1"> </text:span></text:p>
          <text:p text:style-name="P1"><text:span text:style-name="T1">The rock and dirt on the planet's surface resemble coal.</text:span><text:bookmark text:name="userscript-cite_ref-sb-SJR6-p11-s-n_4-3"/><text:a xlink:type="simple" xlink:href="https://www.greyhawkonline.com/greyhawkwiki/Celene_(moon)#cite_note-sb-SJR6-p11-s-n-4" text:style-name="Internet_20_link" text:visited-style-name="Visited_20_Internet_20_Link"><text:span text:style-name="T1">[4]</text:span></text:a><text:span text:style-name="T1"> </text:span></text:p>
          <text:h text:style-name="P22" text:outline-level="3"><text:bookmark text:name="userscript-Ancient_ruins"/>Ancient ruins</text:h>
          <text:p text:style-name="P2">In the distant past it was the home to an unknown, highly civilized, long-since vanished race. Ruins of its civilization can still be found by those who use magic to explore the surface: awe-inspiring castles, delicate towers, and enigmatic temples. The builders must have been of roughly human shape and size, though the ruins have been divined to have been constructed several million years before the first humans walked on Oerth. The ruins of seven cities have been discovered, each large enough to hold a hundred thousand souls, but not a single corpse or skeleton has ever been seen. </text:p>
          <text:p text:style-name="P1"><text:span text:style-name="T1">Divinations and magic have been able to reveal almost nothing about the cities or their builders. Though all manner of magic has been used, both arcane and divine, almost nothing can be discovered about the cities, who built them, or why they left.</text:span><text:bookmark text:name="userscript-cite_ref-sb-SJR6-p11-s-n_4-4"/><text:a xlink:type="simple" xlink:href="https://www.greyhawkonline.com/greyhawkwiki/Celene_(moon)#cite_note-sb-SJR6-p11-s-n-4" text:style-name="Internet_20_link" text:visited-style-name="Visited_20_Internet_20_Link"><text:span text:style-name="T1">[4]</text:span></text:a><text:span text:style-name="T1"> </text:span></text:p>
          <text:h text:style-name="P17" text:outline-level="2"><text:bookmark text:name="userscript-Underdark"/><text:soft-page-break/>Underdark</text:h>
          <text:p text:style-name="P16"><text:span text:style-name="T1">If Celene's surface is lifeless, its </text:span><text:a xlink:type="simple" xlink:href="https://www.greyhawkonline.com/greyhawkwiki/Underdark" text:style-name="Internet_20_link" text:visited-style-name="Visited_20_Internet_20_Link"><text:span text:style-name="T1">underdark</text:span></text:a><text:span text:style-name="T1"> is comparatively thriving, containing caverns filled with water and air. Races familiar to the caverns below </text:span><text:a xlink:type="simple" xlink:href="https://www.greyhawkonline.com/greyhawkwiki/Oerth" text:style-name="Internet_20_link" text:visited-style-name="Visited_20_Internet_20_Link"><text:span text:style-name="T1">Oerth</text:span></text:a><text:span text:style-name="T1"> contend here: </text:span><text:a xlink:type="simple" xlink:href="https://www.greyhawkonline.com/greyhawkwiki/Drow" text:style-name="Internet_20_link" text:visited-style-name="Visited_20_Internet_20_Link"><text:span text:style-name="T1">drow</text:span></text:a><text:span text:style-name="T1"> (20,000), </text:span><text:a xlink:type="simple" xlink:href="https://www.greyhawkonline.com/greyhawkwiki/Kuo-toa" text:style-name="Internet_20_link" text:visited-style-name="Visited_20_Internet_20_Link"><text:span text:style-name="T1">kuo-toa</text:span></text:a><text:span text:style-name="T1"> (5,000), and </text:span><text:a xlink:type="simple" xlink:href="https://www.greyhawkonline.com/greyhawkwiki/Illithid" text:style-name="Internet_20_link" text:visited-style-name="Visited_20_Internet_20_Link"><text:span text:style-name="T1">illithids</text:span></text:a><text:span text:style-name="T1"> (15,000), among other sublunar races to lesser extents. Both the drow and illithids are relative newcomers to Celene, measuring their time on this world in centuries. </text:span></text:p>
          <text:h text:style-name="P22" text:outline-level="3"><text:bookmark text:name="userscript-Notable_settlments"/>Notable settlments</text:h>
          <text:p text:style-name="P16"><text:span text:style-name="T6">Urq'azzt</text:span><text:span text:style-name="T1">, which means "distant home" in the Drow tongue, is a city built within an extinct volcano on Nearside; the volcano is called </text:span><text:span text:style-name="T6">Albest'ar</text:span><text:span text:style-name="T1"> or Hole in the Sky. Urq'azzt is the home of all drow on Celene. The drow practice agriculture, illuminating and irrigating their sublunar farms by magic. The ruler of Urq'azzt is the Empress-Priestess </text:span><text:a xlink:type="simple" xlink:href="https://www.greyhawkonline.com/greyhawkwiki/index.php?title=Lililth&amp;action=edit&amp;redlink=1" text:style-name="Internet_20_link" text:visited-style-name="Visited_20_Internet_20_Link"><text:span text:style-name="T1">Lililth</text:span></text:a><text:span text:style-name="T1"> Darkmane. </text:span></text:p>
          <text:p text:style-name="P2"><text:span text:style-name="T4">Sharp Beak</text:span> is the primary home of Celene's mind flayers, with a population of nearly 10,000. There are several lesser illithid settlements, ranging from more than 1,000 to fewer than 100 individuals. The mind flayers keep herds of slaves for food. </text:p>
        </text:section>
      </text:section>
      <text:h text:style-name="P5" text:outline-level="1"><text:bookmark text:name="userscript-firstHeading Copy 5"/></text:h>
      <text:h text:style-name="P5" text:outline-level="1"><text:bookmark text:name="userscript-firstHeading Copy 7"/>Luna</text:h>
      <text:section text:style-name="Sect1" text:name="Section5">
        <text:p text:style-name="P7"><text:bookmark text:name="userscript-bodyContent Copy 1"/></text:p>
        <text:section text:style-name="Sect1" text:name="userscript-contentSub">
          <text:p text:style-name="P7"/>
        </text:section>
        <text:section text:style-name="Sect1" text:name="Section6">
          <text:p text:style-name="P8"><text:bookmark text:name="userscript-mw-content-text Copy 2"/></text:p>
          <text:p text:style-name="P9"/>
          <table:table table:name="Table5" table:style-name="Table5">
            <table:table-column table:style-name="Table5.A"/>
            <table:table-column table:style-name="Table5.B"/>
            <table:table-row>
              <table:table-cell table:style-name="Table5.A1" table:number-columns-spanned="2" office:value-type="string">
                <text:p text:style-name="P10">Luna</text:p>
              </table:table-cell>
              <table:covered-table-cell/>
            </table:table-row>
            <table:table-row>
              <table:table-cell table:style-name="Table5.A2" table:number-columns-spanned="2" office:value-type="string">
                <text:p text:style-name="P12">Planetary information</text:p>
              </table:table-cell>
              <table:covered-table-cell/>
            </table:table-row>
            <table:table-row>
              <table:table-cell table:style-name="Table5.A3" office:value-type="string">
                <text:p text:style-name="P13">Alias(es):</text:p>
              </table:table-cell>
              <table:table-cell table:style-name="Table5.B3" office:value-type="string">
                <text:p text:style-name="P14">Ranei</text:p>
              </table:table-cell>
            </table:table-row>
            <table:table-row>
              <table:table-cell table:style-name="Table5.A3" office:value-type="string">
                <text:p text:style-name="P13">Type:</text:p>
              </table:table-cell>
              <table:table-cell table:style-name="Table5.B3" office:value-type="string">
                <text:p text:style-name="P14">Spherical earth body</text:p>
              </table:table-cell>
            </table:table-row>
            <table:table-row>
              <table:table-cell table:style-name="Table5.A3" office:value-type="string">
                <text:p text:style-name="P13">Size:</text:p>
              </table:table-cell>
              <table:table-cell table:style-name="Table5.B3" office:value-type="string">
                <text:p text:style-name="P14">D</text:p>
              </table:table-cell>
            </table:table-row>
            <table:table-row>
              <table:table-cell table:style-name="Table5.A2" table:number-columns-spanned="2" office:value-type="string">
                <text:p text:style-name="P12">System information</text:p>
              </table:table-cell>
              <table:covered-table-cell/>
            </table:table-row>
            <table:table-row>
              <table:table-cell table:style-name="Table5.A3" office:value-type="string">
                <text:p text:style-name="P13">Day:</text:p>
              </table:table-cell>
              <table:table-cell table:style-name="Table5.B3" office:value-type="string">
                <text:p text:style-name="P14">8 hours</text:p>
              </table:table-cell>
            </table:table-row>
            <table:table-row>
              <table:table-cell table:style-name="Table5.A3" office:value-type="string">
                <text:p text:style-name="P13">Year:</text:p>
              </table:table-cell>
              <table:table-cell table:style-name="Table5.B3" office:value-type="string">
                <text:p text:style-name="P14">28 days</text:p>
              </table:table-cell>
            </table:table-row>
            <table:table-row>
              <table:table-cell table:style-name="Table5.A2" table:number-columns-spanned="2" office:value-type="string">
                <text:p text:style-name="P12">Fauna</text:p>
              </table:table-cell>
              <table:covered-table-cell/>
            </table:table-row>
            <table:table-row>
              <table:table-cell table:style-name="Table5.A3" office:value-type="string">
                <text:p text:style-name="P13">Inhabitants:</text:p>
              </table:table-cell>
              <table:table-cell table:style-name="Table5.B3" office:value-type="string">
                <text:p text:style-name="P15">Various nonsentient lifeforms; miscellaneous settlers</text:p>
              </table:table-cell>
            </table:table-row>
          </table:table>
          <text:p text:style-name="P1"><text:span text:style-name="T3">Luna</text:span><text:span text:style-name="T1">, known as </text:span><text:span text:style-name="T3">Raenei</text:span><text:span text:style-name="T1">, is one of </text:span><text:a xlink:type="simple" xlink:href="https://www.greyhawkonline.com/greyhawkwiki/Oerth" text:style-name="Internet_20_link" text:visited-style-name="Visited_20_Internet_20_Link"><text:span text:style-name="T1">Oerth</text:span></text:a><text:span text:style-name="T1">'s two </text:span><text:a xlink:type="simple" xlink:href="https://www.greyhawkonline.com/greyhawkwiki/Moon" text:style-name="Internet_20_link" text:visited-style-name="Visited_20_Internet_20_Link"><text:span text:style-name="T1">moons</text:span></text:a><text:span text:style-name="T1">—it is called the Greater Moon or the Mistress. It is Oerth's silver satellite, the companion to the Lesser Moon, </text:span><text:a xlink:type="simple" xlink:href="https://www.greyhawkonline.com/greyhawkwiki/Celene_(moon)" text:style-name="Internet_20_link" text:visited-style-name="Visited_20_Internet_20_Link"><text:span text:style-name="T1">Celene</text:span></text:a><text:span text:style-name="T1">. It is known as </text:span><text:span text:style-name="T3">Mazlateotl</text:span><text:bookmark text:name="userscript-cite_ref-sb-TSB-p64-s-n_1-0 Copy 1"/><text:a xlink:type="simple" xlink:href="https://www.greyhawkonline.com/greyhawkwiki/Luna#cite_note-sb-TSB-p64-s-n-1" text:style-name="Internet_20_link" text:visited-style-name="Visited_20_Internet_20_Link"><text:span text:style-name="T1">[1]</text:span></text:a><text:span text:style-name="T1"> among the </text:span><text:a xlink:type="simple" xlink:href="https://www.greyhawkonline.com/greyhawkwiki/Olman" text:style-name="Internet_20_link" text:visited-style-name="Visited_20_Internet_20_Link"><text:span text:style-name="T1">Olman</text:span></text:a><text:span text:style-name="T1"> and as </text:span><text:span text:style-name="T3">Konola</text:span><text:bookmark text:name="userscript-cite_ref-sb-TSB-p38-s-n_2-0 Copy 1"/><text:a xlink:type="simple" xlink:href="https://www.greyhawkonline.com/greyhawkwiki/Luna#cite_note-sb-TSB-p38-s-n-2" text:style-name="Internet_20_link" text:visited-style-name="Visited_20_Internet_20_Link"><text:span text:style-name="T1">[2]</text:span></text:a><text:span text:style-name="T1"> among the </text:span><text:a xlink:type="simple" xlink:href="https://www.greyhawkonline.com/greyhawkwiki/Touv" text:style-name="Internet_20_link" text:visited-style-name="Visited_20_Internet_20_Link"><text:span text:style-name="T1">Touv</text:span></text:a><text:span text:style-name="T1">. From the perspective of Oerth, it cycles from its new to full phases once a month. </text:span></text:p>
          <text:section text:style-name="Sect1" text:name="Section7">
            <text:p text:style-name="P1"><text:bookmark text:name="userscript-toc Copy 1"/></text:p>
          </text:section>
          <text:h text:style-name="P17" text:outline-level="2"><text:bookmark text:name="userscript-Appearance"/><text:soft-page-break/>Appearance</text:h>
          <text:p text:style-name="P1"><text:span text:style-name="T1">From Oerth, Luna does not appear </text:span><text:span text:style-name="T6">much</text:span><text:span text:style-name="T1"> larger than Celene, but the difference is noticeable. Because of this, it covers more (but not all) of the solar corona compared to Celene and solar eclipses are less spectacular when Luna is involved than when only Celene is.</text:span><text:bookmark text:name="userscript-cite_ref-sb-SJR6-p17-s-n_3-0"/><text:a xlink:type="simple" xlink:href="https://www.greyhawkonline.com/greyhawkwiki/Luna#cite_note-sb-SJR6-p17-s-n-3" text:style-name="Internet_20_link" text:visited-style-name="Visited_20_Internet_20_Link"><text:span text:style-name="T1">[3]</text:span></text:a><text:span text:style-name="T1"> </text:span></text:p>
          <text:p text:style-name="P1"><text:span text:style-name="T1">Luna appears, from the Oerth, as a featureless silver disk (varying between white, silver, and gray, with cloud cover creating a slight sense of changing patterns).</text:span><text:bookmark text:name="userscript-cite_ref-sb-SJR6-p18-s-n_4-0"/><text:a xlink:type="simple" xlink:href="https://www.greyhawkonline.com/greyhawkwiki/Luna#cite_note-sb-SJR6-p18-s-n-4" text:style-name="Internet_20_link" text:visited-style-name="Visited_20_Internet_20_Link"><text:span text:style-name="T1">[4]</text:span></text:a><text:span text:style-name="T1"> Two atmospheres obscure the planet's terrain—both Luna's and Oerth's</text:span><text:bookmark text:name="userscript-cite_ref-sb-SJR6-p17-s-n_3-1"/><text:a xlink:type="simple" xlink:href="https://www.greyhawkonline.com/greyhawkwiki/Luna#cite_note-sb-SJR6-p17-s-n-3" text:style-name="Internet_20_link" text:visited-style-name="Visited_20_Internet_20_Link"><text:span text:style-name="T1">[3]</text:span></text:a><text:span text:style-name="T1">—so the haze makes it impossible to see any detail without traveling into space. Luna's atmosphere can refract light, though—when the conditions are right, during an eclipse the light from Celene will reflect in Luna's atmosphere, causing it to seem to be surrounded by a shining aquamarine halo.</text:span><text:bookmark text:name="userscript-cite_ref-sb-SJR6-p17-s-n_3-2"/><text:a xlink:type="simple" xlink:href="https://www.greyhawkonline.com/greyhawkwiki/Luna#cite_note-sb-SJR6-p17-s-n-3" text:style-name="Internet_20_link" text:visited-style-name="Visited_20_Internet_20_Link"><text:span text:style-name="T1">[3]</text:span></text:a><text:span text:style-name="T1"> </text:span></text:p>
          <text:p text:style-name="P2">Unlike Celene, Luna is not tidally locked with the Oerth; it rotates on its own axis and shows the "mother planet" both of its sides. However, both sides look the same from Oerth, so this does not make much difference. Its axis of rotation is at right angles to that of the Oerth, so from the perspective of Luna, Oerth rises in the north and set in the south (or vice versa, depending on the season). Oerth is large and bright enough to be visible from Luna both night and day. The sky is covered with clouds much of the time, and titanic thunderstorms are common in some regions, especially the north pole and the Polar Ring mountains. </text:p>
          <text:h text:style-name="P17" text:outline-level="2"><text:bookmark text:name="userscript-Environment"/>Environment</text:h>
          <text:h text:style-name="P22" text:outline-level="3"><text:bookmark text:name="userscript-Geography"/>Geography</text:h>
          <text:p text:style-name="P1"><text:span text:style-name="T1">Luna's surface is mostly dry land, with water covering only about 30% of it.</text:span><text:bookmark text:name="userscript-cite_ref-sb-SJR6-p19-s-n_5-0"/><text:a xlink:type="simple" xlink:href="https://www.greyhawkonline.com/greyhawkwiki/Luna#cite_note-sb-SJR6-p19-s-n-5" text:style-name="Internet_20_link" text:visited-style-name="Visited_20_Internet_20_Link"><text:span text:style-name="T1">[5]</text:span></text:a><text:span text:style-name="T1"> Prominent features (invisible from Oerth) include the Worldspine Mountains, which completely encircle the equator, an ocean in each hemisphere (the Deepsound Sea and the Saltwaste), and a circular desert known as the Anvil of God. A range of tall mountains called the Polar Ring surrounds the north pole, equidistant in every direction. </text:span></text:p>
          <text:p text:style-name="P1"><text:span text:style-name="T1">There is as wide a variety of geographical features on Luna as there are on Oerth—plains, deserts, forests, scrublands, mountains, etc.</text:span><text:bookmark text:name="userscript-cite_ref-sb-SJR6-p19-s-n_5-1"/><text:a xlink:type="simple" xlink:href="https://www.greyhawkonline.com/greyhawkwiki/Luna#cite_note-sb-SJR6-p19-s-n-5" text:style-name="Internet_20_link" text:visited-style-name="Visited_20_Internet_20_Link"><text:span text:style-name="T1">[5]</text:span></text:a><text:span text:style-name="T1"> The oceans have the same variety. from shallows to trenches and sinkholes.</text:span><text:bookmark text:name="userscript-cite_ref-sb-SJR6-p19-s-n_5-2"/><text:a xlink:type="simple" xlink:href="https://www.greyhawkonline.com/greyhawkwiki/Luna#cite_note-sb-SJR6-p19-s-n-5" text:style-name="Internet_20_link" text:visited-style-name="Visited_20_Internet_20_Link"><text:span text:style-name="T1">[5]</text:span></text:a><text:span text:style-name="T1"> </text:span></text:p>
          <text:h text:style-name="P22" text:outline-level="3"><text:bookmark text:name="userscript-Atmosphere"/>Atmosphere</text:h>
          <text:p text:style-name="P1"><text:span text:style-name="T1">The sky of Luna is not blue as Oerth's is; instead, it is lavender</text:span><text:bookmark text:name="userscript-cite_ref-sb-Rot8-p49-s-n_6-0"/><text:a xlink:type="simple" xlink:href="https://www.greyhawkonline.com/greyhawkwiki/Luna#cite_note-sb-Rot8-p49-s-n-6" text:style-name="Internet_20_link" text:visited-style-name="Visited_20_Internet_20_Link"><text:span text:style-name="T1">[6]</text:span></text:a><text:span text:style-name="T1"> </text:span></text:p>
          <text:p text:style-name="P1"><text:span text:style-name="T1">The atmosphere of Luna is short of oxygen.</text:span><text:bookmark text:name="userscript-cite_ref-sb-SJR6-p17-s-n_3-3"/><text:a xlink:type="simple" xlink:href="https://www.greyhawkonline.com/greyhawkwiki/Luna#cite_note-sb-SJR6-p17-s-n-3" text:style-name="Internet_20_link" text:visited-style-name="Visited_20_Internet_20_Link"><text:span text:style-name="T1">[3]</text:span></text:a><text:span text:style-name="T1"> Inert gases like nitrogen, helium, and others comprise the remainder. Those unaccustomed to this will find themselves constantly out of breath and tired, becoming fatigued twice as fast as normal.</text:span><text:bookmark text:name="userscript-cite_ref-sb-SJR6-p17-s-n_3-4"/><text:a xlink:type="simple" xlink:href="https://www.greyhawkonline.com/greyhawkwiki/Luna#cite_note-sb-SJR6-p17-s-n-3" text:style-name="Internet_20_link" text:visited-style-name="Visited_20_Internet_20_Link"><text:span text:style-name="T1">[3]</text:span></text:a><text:span text:style-name="T1"> </text:span></text:p>
          <text:p text:style-name="P2">Fire based spell damage is reduced by half, rounded down, to a minimum of 1 hp. </text:p>
          <text:p text:style-name="P1"><text:span text:style-name="T1">Due to the clouds and humidity, visibility is low; one-half to one-tenth normal.</text:span><text:bookmark text:name="userscript-cite_ref-sb-Rot8-p48-s-n_7-0"/><text:a xlink:type="simple" xlink:href="https://www.greyhawkonline.com/greyhawkwiki/Luna#cite_note-sb-Rot8-p48-s-n-7" text:style-name="Internet_20_link" text:visited-style-name="Visited_20_Internet_20_Link"><text:span text:style-name="T1">[7]</text:span></text:a><text:span text:style-name="T1"> </text:span></text:p>
          <text:h text:style-name="P22" text:outline-level="3"><text:bookmark text:name="userscript-Magnetosphere"/><text:soft-page-break/>Magnetosphere</text:h>
          <text:p text:style-name="P1"><text:span text:style-name="T1">The molten core of Luna (Ranei) is nikel-iron and it has a strong magnetic field surrounding the planet</text:span><text:bookmark text:name="userscript-cite_ref-sb-SJR6-p19-s-n_5-3"/><text:a xlink:type="simple" xlink:href="https://www.greyhawkonline.com/greyhawkwiki/Luna#cite_note-sb-SJR6-p19-s-n-5" text:style-name="Internet_20_link" text:visited-style-name="Visited_20_Internet_20_Link"><text:span text:style-name="T1">[5]</text:span></text:a><text:span text:style-name="T1"> making compass navigation impossible.</text:span><text:bookmark text:name="userscript-cite_ref-sb-SJR6-p19-s-n_5-4"/><text:a xlink:type="simple" xlink:href="https://www.greyhawkonline.com/greyhawkwiki/Luna#cite_note-sb-SJR6-p19-s-n-5" text:style-name="Internet_20_link" text:visited-style-name="Visited_20_Internet_20_Link"><text:span text:style-name="T1">[5]</text:span></text:a><text:span text:style-name="T1"> Their needles spin crazily</text:span><text:bookmark text:name="userscript-cite_ref-sb-Rot8-p48-49-s-n_8-0"/><text:a xlink:type="simple" xlink:href="https://www.greyhawkonline.com/greyhawkwiki/Luna#cite_note-sb-Rot8-p48-49-s-n-8" text:style-name="Internet_20_link" text:visited-style-name="Visited_20_Internet_20_Link"><text:span text:style-name="T1">[8]</text:span></text:a><text:span text:style-name="T1"> Like the rotational axis of the planet (causing day and night), the magnetic axis of the planet is aligned perpendicularly to the Oerth's ecliptic.</text:span><text:bookmark text:name="userscript-cite_ref-sb-SJR6-p19-s-n_5-5"/><text:a xlink:type="simple" xlink:href="https://www.greyhawkonline.com/greyhawkwiki/Luna#cite_note-sb-SJR6-p19-s-n-5" text:style-name="Internet_20_link" text:visited-style-name="Visited_20_Internet_20_Link"><text:span text:style-name="T1">[5]</text:span></text:a><text:span text:style-name="T1"> </text:span></text:p>
          <text:p text:style-name="P1"><text:span text:style-name="T1">Luna has auroras over both north and south poles almost continuously.</text:span><text:bookmark text:name="userscript-cite_ref-sb-SJR6-p19-s-n_5-6"/><text:a xlink:type="simple" xlink:href="https://www.greyhawkonline.com/greyhawkwiki/Luna#cite_note-sb-SJR6-p19-s-n-5" text:style-name="Internet_20_link" text:visited-style-name="Visited_20_Internet_20_Link"><text:span text:style-name="T1">[5]</text:span></text:a><text:span text:style-name="T1"> </text:span></text:p>
          <text:h text:style-name="P17" text:outline-level="2"><text:bookmark text:name="userscript-Ecology"/>Ecology</text:h>
          <text:h text:style-name="P22" text:outline-level="3"><text:bookmark text:name="userscript-Flora"/>Flora</text:h>
          <text:p text:style-name="P1"><text:span text:style-name="T1">Luna also has a great deal of native flora, many of them dangerous or intelligent.</text:span><text:bookmark text:name="userscript-cite_ref-sb-Rot8-p49-s-n_6-1"/><text:a xlink:type="simple" xlink:href="https://www.greyhawkonline.com/greyhawkwiki/Luna#cite_note-sb-Rot8-p49-s-n-6" text:style-name="Internet_20_link" text:visited-style-name="Visited_20_Internet_20_Link"><text:span text:style-name="T1">[6]</text:span></text:a><text:span text:style-name="T1"> Some of these plants, like </text:span><text:a xlink:type="simple" xlink:href="https://www.greyhawkonline.com/greyhawkwiki/Bronzewood" text:style-name="Internet_20_link" text:visited-style-name="Visited_20_Internet_20_Link"><text:span text:style-name="T1">bronzewood</text:span></text:a><text:span text:style-name="T1">, cedar, and oak, are familiar to travelers from Oerth, though they may have "notable variations in size or color; or they may have poisonous, allergy-producing or hallucinogenic plant pollens.</text:span><text:bookmark text:name="userscript-cite_ref-sb-Rot8-p49-s-n_6-2"/><text:a xlink:type="simple" xlink:href="https://www.greyhawkonline.com/greyhawkwiki/Luna#cite_note-sb-Rot8-p49-s-n-6" text:style-name="Internet_20_link" text:visited-style-name="Visited_20_Internet_20_Link"><text:span text:style-name="T1">[6]</text:span></text:a><text:span text:style-name="T1"> Even the "recognizable plants are different."</text:span><text:bookmark text:name="userscript-cite_ref-sb-Rot8-p48-s-n_7-1"/><text:a xlink:type="simple" xlink:href="https://www.greyhawkonline.com/greyhawkwiki/Luna#cite_note-sb-Rot8-p48-s-n-7" text:style-name="Internet_20_link" text:visited-style-name="Visited_20_Internet_20_Link"><text:span text:style-name="T1">[7]</text:span></text:a><text:span text:style-name="T1"> Others are completely alien. </text:span></text:p>
          <text:h text:style-name="P22" text:outline-level="3"><text:bookmark text:name="userscript-Fauna"/>Fauna</text:h>
          <text:p text:style-name="P1"><text:span text:style-name="T1">Luna has no sapient natives, though there is wildlife. There are a few groups of intelligent beings who have ended up here from other worlds. There is a settlement of about 200 called Triumph.</text:span><text:bookmark text:name="userscript-cite_ref-sb-SJR6-p21-22-s-n_9-0"/><text:a xlink:type="simple" xlink:href="https://www.greyhawkonline.com/greyhawkwiki/Luna#cite_note-sb-SJR6-p21-22-s-n-9" text:style-name="Internet_20_link" text:visited-style-name="Visited_20_Internet_20_Link"><text:span text:style-name="T1">[9]</text:span></text:a><text:span text:style-name="T1"> </text:span><text:a xlink:type="simple" xlink:href="https://www.greyhawkonline.com/greyhawkwiki/Iggwilv" text:style-name="Internet_20_link" text:visited-style-name="Visited_20_Internet_20_Link"><text:span text:style-name="T1">Iggwilv</text:span></text:a><text:span text:style-name="T1"> had a hidden stronghold here which was used by </text:span><text:a xlink:type="simple" xlink:href="https://www.greyhawkonline.com/greyhawkwiki/Tuerny" text:style-name="Internet_20_link" text:visited-style-name="Visited_20_Internet_20_Link"><text:span text:style-name="T1">Tuerny</text:span></text:a><text:span text:style-name="T1"> during their brief alliance.</text:span><text:bookmark text:name="userscript-cite_ref-sb-Rot8-p48-51-s-n_10-0"/><text:a xlink:type="simple" xlink:href="https://www.greyhawkonline.com/greyhawkwiki/Luna#cite_note-sb-Rot8-p48-51-s-n-10" text:style-name="Internet_20_link" text:visited-style-name="Visited_20_Internet_20_Link"><text:span text:style-name="T1">[10]</text:span></text:a><text:span text:style-name="T1"> Both are inside the Polar Ring mountains. </text:span></text:p>
          <text:p text:style-name="P2">Luna's native animals tend to be large and monstrous, alien and horrific by Oerth standards. </text:p>
          <text:p text:style-name="P1"><text:span text:style-name="T1">Creatures "with lightning natures" are common in Luna's upper atmosphere.</text:span><text:bookmark text:name="userscript-cite_ref-sb-Rot8-p49-s-n_6-3"/><text:a xlink:type="simple" xlink:href="https://www.greyhawkonline.com/greyhawkwiki/Luna#cite_note-sb-Rot8-p49-s-n-6" text:style-name="Internet_20_link" text:visited-style-name="Visited_20_Internet_20_Link"><text:span text:style-name="T1">[6]</text:span></text:a><text:span text:style-name="T1"> Creatures such as lightning quasi-elementals, numbuses, and other creatures native to the </text:span><text:a xlink:type="simple" xlink:href="https://www.greyhawkonline.com/greyhawkwiki/index.php?title=Quasielemental_Plane_of_Lightning&amp;action=edit&amp;redlink=1" text:style-name="Internet_20_link" text:visited-style-name="Visited_20_Internet_20_Link"><text:span text:style-name="T1">Quasielemental Plane of Lightning</text:span></text:a><text:span text:style-name="T1"> are common. </text:span></text:p>
        </text:section>
      </text:section>
      <text:p text:style-name="Text_20_body"/>
      <text:p text:style-name="Text_20_body"><text:line-break/></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arial black" svg:font-family="'arial black'"/>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07T23:17:50.616853900</meta:creation-date>
    <dc:date>2026-05-07T23:21:27.065721600</dc:date>
    <meta:editing-duration>PT3M43S</meta:editing-duration>
    <meta:editing-cycles>1</meta:editing-cycles>
    <meta:document-statistic meta:table-count="5" meta:image-count="2" meta:object-count="0" meta:page-count="10" meta:paragraph-count="196" meta:word-count="2353" meta:character-count="14150" meta:non-whitespace-character-count="11876"/>
    <meta:generator>LibreOffice/25.2.7.2$Windows_X86_64 LibreOffice_project/5cbfd1ab6520636bb5f7b99185aa69bd7456825d</meta:generator>
  </office:meta>
</office:document-meta>
</file>